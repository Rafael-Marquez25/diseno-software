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e0c2e" officeooo:paragraph-rsid="001e0c2e"/>
    </style:style>
    <style:style style:name="P2" style:family="paragraph" style:parent-style-name="Heading_20_3">
      <style:text-properties officeooo:rsid="001e0c2e" officeooo:paragraph-rsid="001e0c2e"/>
    </style:style>
    <style:style style:name="P3" style:family="paragraph" style:parent-style-name="Heading_20_3">
      <style:text-properties officeooo:paragraph-rsid="001e0c2e"/>
    </style:style>
    <style:style style:name="P4" style:family="paragraph" style:parent-style-name="Heading_20_3">
      <style:text-properties officeooo:paragraph-rsid="001f040c"/>
    </style:style>
    <style:style style:name="P5" style:family="paragraph" style:parent-style-name="Text_20_body">
      <style:text-properties officeooo:rsid="001e0c2e" officeooo:paragraph-rsid="001e0c2e"/>
    </style:style>
    <style:style style:name="P6" style:family="paragraph" style:parent-style-name="Text_20_body">
      <style:text-properties officeooo:rsid="001e0c2e" officeooo:paragraph-rsid="001f040c"/>
    </style:style>
    <style:style style:name="P7" style:family="paragraph" style:parent-style-name="Text_20_body">
      <style:text-properties officeooo:rsid="001e0c2e" officeooo:paragraph-rsid="0020f625"/>
    </style:style>
    <style:style style:name="P8" style:family="paragraph" style:parent-style-name="Text_20_body">
      <style:text-properties officeooo:rsid="0020b81d" officeooo:paragraph-rsid="0020b81d"/>
    </style:style>
    <style:style style:name="P9" style:family="paragraph" style:parent-style-name="Title">
      <style:text-properties officeooo:rsid="001e0c2e" officeooo:paragraph-rsid="001e0c2e"/>
    </style:style>
    <style:style style:name="T1" style:family="text">
      <style:text-properties officeooo:rsid="001e0c2e"/>
    </style:style>
    <style:style style:name="T2" style:family="text">
      <style:text-properties officeooo:rsid="001f040c"/>
    </style:style>
    <style:style style:name="T3" style:family="text">
      <style:text-properties officeooo:rsid="0020b81d"/>
    </style:style>
    <style:style style:name="T4" style:family="text">
      <style:text-properties officeooo:rsid="0020f625"/>
    </style:style>
    <style:style style:name="T5" style:family="text">
      <style:text-properties officeooo:rsid="0021f1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áctica 2</text:p>
      <text:h text:style-name="P1" text:outline-level="1">Objetos <text:span text:style-name="T2">Del Sistema.</text:span></text:h>
      <text:h text:style-name="P2" text:outline-level="3">Robot Asistente:</text:h>
      <text:p text:style-name="P5">Caracteristicas:</text:p>
      <text:p text:style-name="P5"><text:tab/><text:span text:style-name="T2">Id Robot:</text:span></text:p>
      <text:p text:style-name="P8"><text:tab/>Recorridos Predefinidos:</text:p>
      <text:p text:style-name="P5"><text:tab/></text:p>
      <text:p text:style-name="P5">Acciones:</text:p>
      <text:p text:style-name="P5"><text:tab/><text:span text:style-name="T4">Moverse:</text:span></text:p>
      <text:p text:style-name="P5"><text:tab/><text:span text:style-name="T3">Ofrecer Acompañamiento</text:span><text:span text:style-name="T2">:</text:span></text:p>
      <text:p text:style-name="P5"><text:tab/><text:span text:style-name="T2">Definir Estado:</text:span></text:p>
      <text:p text:style-name="P5"><text:tab/><text:span text:style-name="T2">Devolver Estado:</text:span></text:p>
      <text:p text:style-name="P5"><text:tab/><text:span text:style-name="T2">Ir a Cargarse:</text:span></text:p>
      <text:p text:style-name="P5"><text:tab/><text:span text:style-name="T3">Solicitar Info Paciente:</text:span></text:p>
      <text:p text:style-name="P5"><text:tab/><text:span text:style-name="T4">Validar Info Paciente:</text:span></text:p>
      <text:p text:style-name="P5"><text:tab/><text:span text:style-name="T3">Emitir Ticket:</text:span></text:p>
      <text:p text:style-name="P8"><text:tab/>Actualizar Ubicacion:</text:p>
      <text:p text:style-name="P8"><text:tab/>Obtener Ubicacion:</text:p>
      <text:p text:style-name="P8"><text:tab/></text:p>
      <text:h text:style-name="P3" text:outline-level="3"><text:span text:style-name="T1">Paciente:</text:span></text:h>
      <text:p text:style-name="P5">Caracteristicas:</text:p>
      <text:p text:style-name="P5"><text:tab/><text:span text:style-name="T2">Id Paciente:</text:span></text:p>
      <text:p text:style-name="P5"><text:tab/><text:span text:style-name="T4">Contraseña:</text:span></text:p>
      <text:p text:style-name="P5"><text:tab/><text:span text:style-name="T2">Informacion </text:span><text:span text:style-name="T4">Personal</text:span><text:span text:style-name="T2">:</text:span></text:p>
      <text:p text:style-name="P5"><text:tab/><text:span text:style-name="T4">Id Cita:</text:span></text:p>
      <text:p text:style-name="P6">Acciones:</text:p>
      <text:p text:style-name="P6"><text:tab/><text:span text:style-name="T4">Logearse:</text:span></text:p>
      <text:p text:style-name="P7"><text:tab/><text:span text:style-name="T2">Pedir Ticket:</text:span><text:line-break/><text:tab/><text:span text:style-name="T2">Actualizar Info:</text:span></text:p>
      <text:p text:style-name="P5"><text:tab/><text:span text:style-name="T2">Ver Historial Citas:</text:span></text:p>
      <text:p text:style-name="P5"><text:soft-page-break/><text:tab/><text:span text:style-name="T2">Consultar disponivilidad:</text:span></text:p>
      <text:p text:style-name="P5"><text:tab/><text:span text:style-name="T2">Alta de </text:span><text:span text:style-name="T4">C</text:span><text:span text:style-name="T2">ita:</text:span></text:p>
      <text:p text:style-name="P5"><text:tab/><text:span text:style-name="T2">Modificacion cita:</text:span></text:p>
      <text:p text:style-name="P5"><text:tab/><text:span text:style-name="T4">Estado Cita:</text:span></text:p>
      <text:p text:style-name="P5"><text:tab/><text:span text:style-name="T4">Devolver Id:</text:span></text:p>
      <text:h text:style-name="Heading_20_3" text:outline-level="3">Medicos:</text:h>
      <text:p text:style-name="P5">Caractericas:</text:p>
      <text:p text:style-name="P5"><text:tab/><text:span text:style-name="T5">Horarios de Atencion:</text:span></text:p>
      <text:p text:style-name="P5"><text:tab/><text:span text:style-name="T5">Agenda:</text:span></text:p>
      <text:p text:style-name="P5"><text:tab/><text:span text:style-name="T5">Especialidad:</text:span></text:p>
      <text:p text:style-name="P5"><text:tab/><text:span text:style-name="T5">Estado:</text:span></text:p>
      <text:p text:style-name="P5">Acciones:</text:p>
      <text:p text:style-name="P5"><text:tab/><text:span text:style-name="T5">Registrar Asistencia:</text:span></text:p>
      <text:p text:style-name="P5"><text:tab/><text:span text:style-name="T5">Añadir Info Consulta:</text:span></text:p>
      <text:p text:style-name="P5"><text:tab/><text:span text:style-name="T5">Get Estado:</text:span></text:p>
      <text:p text:style-name="P5"/>
      <text:h text:style-name="P4" text:outline-level="3"><text:span text:style-name="T2">Administrador</text:span>:</text:h>
      <text:p text:style-name="P6">Caractericas:</text:p>
      <text:p text:style-name="P6"/>
      <text:p text:style-name="P6">Acciones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5T11:54:29.962601335</meta:creation-date>
    <dc:date>2025-09-25T12:44:57.452625342</dc:date>
    <meta:editing-duration>PT5M15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47" meta:word-count="83" meta:character-count="705" meta:non-whitespace-character-count="633"/>
  </office:meta>
</office:document-meta>
</file>